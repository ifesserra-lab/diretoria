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Fitoterápicos em Horta: Compostos Químicos em Ação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Nauvia Maria Cancelieri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9/09/2018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12/12/2020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>(   ) Meio Ambiente(1) 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34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projeto Fitoterápicos em Horta: Compostos Químicos em Ação envolveu 34 participantes e 1 servidor, promovendo a conscientização sobre o uso de fitoterápicos e o resgate de saberes populares. A ação resultou na implementação de uma horta com espécies vegetais, ampliando o conhecimento sobre compostos químicos e práticas sustentáveis na comunidade acadêmica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