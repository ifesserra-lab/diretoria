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 Seminário do Núcleo de Estudos Afro-Brasileiros e Indígenas do Ifes Campus Serra – Levantamento das referências culturais de São José do Queimado, Serra/E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Diego Ramiro Araoz Alv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7/2019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5/07/2019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I Seminário do Núcleo de Estudos Afro-Brasileiros e Indígenas do Ifes Campus Serra – Levantamento das referências culturais de São José do Queimado, Serra/ES</text:p>
          </table:table-cell>
          <table:table-cell table:style-name="Tabela5.B3" office:value-type="string">
            <text:p>O 1º Seminário do Núcleo de Estudos Afro-Brasileiros e Indígenas do IFES Campus Serra tem por objetivo principal apresentar os resultados parciais da pesquisa “Levantamento das referências culturais de São José do Queimado, Serra/ES” para os movimentos sociais, o Iphan, estudantes e demais interessados. Outro objetivo é debater, a partir do caso de Queimado, o tema da educação para as relações étnico-raciais em seus múltiplos aspectos, conforme descrito na programação. Para tanto, serão realizadas palestras, mesas-redondas, oficinas, atividades culturais e uma plenária visando o planejamento das atividades para o mês da consciência negra, em novembro, quando acontecerá o 2º Seminário do NEABI. Como resultado, espera-se estreitar as relações entre as instituições e instâncias governamentais envolvidas e os atores da sociedade civil que figuram como público-alvo deste evento, amadurecer o debate sobre os mecanismos de reconhecimento do Sítio Histórico e Arqueológico de São José do Queimado em nível nacional, além de difundir a cultura de reflexão sobre as relações étnico-raciais na comunidade escolar e, em particular, sobre os povos tradicionais e originários no Espírito Santo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I Seminário do Núcleo de Estudos Afro-Brasileiros e Indígenas do Ifes Campus Serra apresentou resultados parciais de pesquisa sobre referências culturais de São José do Queimado, reunindo estudantes, movimentos sociais e representantes institucionais. A ação fomentou o debate sobre diversidade cultural e memória local, fortalecendo a identidade e o pertencimento da comunidade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