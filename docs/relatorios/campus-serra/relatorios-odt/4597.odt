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 IFES é o meu lugar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ugusto Cesar Machado Ram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3/04/2023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2/11/2023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79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O IFES é o meu lugar</text:p>
          </table:table-cell>
          <table:table-cell table:style-name="Tabela5.B3" office:value-type="string">
            <text:p>O Instituto Federal do Espírito Santo – Campus Serra foi inaugurado em 2001, e desde então
oferta cursos técnicos subsequentes e, posteriormente, cursos superiores e mestrado
profissional. Somente a partir de 2017, considerando-se as expectativas da comunidade local,
esse campus passou a ofertar o ensino médio integrado à educação profissional, o que
significou um grande avanço no que diz respeito ao acesso ao ensino médio de qualidade no
referido município.
Nesse contexto, o projeto “O IFES é o meu lugar” visa estimular os alunos da rede pública, por
meio de uma preparação para o processo seletivo do ensino médio integrado, com aulas
expositivas e dialogadas, bem como a resolução de exercícios das disciplinas do ensino
fundamental, visando possibilitar a esses alunos uma revisão dos conteúdos trabalhados em
suas respectivas escolas. Nesse contexto, esperamos que os alunos estejam preparados e
estimulados a realizarem uma boa prova no processo seletivo, como forma de ingresso ao
ensino médio integrado no IFES Campus Serra ou em qualquer instituição do IFES no estado.</text:p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jeto contribuiu para a integração dos estudantes ingressantes ao campus, promovendo a ambientação e o fortalecimento do pertencimento institucional. As ações desenvolvidas favoreceram a adaptação dos novos alunos ao ambiente acadêmico e às dinâmicas do IFES Serra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