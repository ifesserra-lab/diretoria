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Energia Solar Fotovolta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Giovani Zanetti Neto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>04/03/2017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>25/03/2017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 text:style-name="P42"><text:span text:style-name="T7">( <text:s text:c="2"/>) </text:span>Direitos Humanos e Justiça <text:s text:c="17"/></text:p>
            <text:p text:style-name="P42"><text:span text:style-name="T7">( <text:s text:c="2"/>)</text:span> Educação</text:p>
          </table:table-cell>
          <table:table-cell table:style-name="Tabela22.C2" office:value-type="string">
            <text:p>(1) Tecnologia e Produção(   ) Trabalho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25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>Energia Solar Fotovoltaica</text:p>
          </table:table-cell>
          <table:table-cell table:style-name="Tabela5.B3" office:value-type="string">
            <text:p>O curso de extensão Energia Solar Fotovoltaica tem por objetivo abordar fundamento teóricos e aspectos práticos do uso da energia solar para geração de energia elétrica. O curso se organiza em quatro módulos que compreendem as características de painéis solares fotovoltaicos, os sistemas solares fotovoltaicos, os processos físicos e químicos envolvidos e aspectos práticos relacionados ao projeto, instalação e manutenção de plantas solares.</text:p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>[Sugestão gerada por IA (Mistral) — revise e ajuste antes de enviar]
O curso capacitou 25 participantes em fundamentos teóricos e práticos sobre energia solar fotovoltaica, disseminando conhecimentos essenciais para a adoção de tecnologias sustentáveis. A formação contribuiu para a ampliação da conscientização sobre fontes renováveis de energia e para a aplicação de sistemas solares em contextos locais.</text:p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