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Nova plataforma NVIDIA para HPC e Inteligência Artificial (IA)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Sérgio dos Santos Júnio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