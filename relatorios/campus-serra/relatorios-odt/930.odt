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Despertar da Força - Processos e Ferramentas para o Gerenciamento Ágil de Projetos: Uma Abordagem Prátic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Paulo Sérgio dos Santos Júnior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1/10/2016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01/12/2016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53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Despertar da Força - Processos e Ferramentas para o Gerenciamento Ágil de Projetos: Uma Abordagem Prática</text:p>
          </table:table-cell>
          <table:table-cell table:style-name="Tabela5.B3" office:value-type="string">
            <text:p>O presente curso visa o desenvolvimento de habilidades básicas relacionadas ao gerenciamento de projetos interdisciplinares, inovação e métodos ágeis, para que professores e alunos dos Institutos Federais. O curso faz parte de um projeto de desenvolvimento de laboratórios dentro da rede dos Institutos capaz de interligar a comunidade acadêmica, o setor produtivo e a sociedade, desenvolvendo projetos colaborativos tentando resolver problemas reais.</text:p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A ação possibilitou o desenvolvimento de competências em gerenciamento ágil de projetos para 53 participantes, entre professores e alunos, contribuindo para a qualificação técnica e a adoção de metodologias inovadoras no âmbito dos Institutos Federais. A iniciativa reforçou a integração entre ensino, pesquisa e extensão, alinhando-se às demandas por formação interdisciplinar e práticas atualizadas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