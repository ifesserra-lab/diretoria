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I Encontro Cultural do Núcleo de Estudos Afro-Brasileiros e Indígenas : Debates e reflexões no Dia da Consciência Negr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Diego Ramiro Araoz Alv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