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Oficinas e Tutorias de Apoio às Disciplinas Curriculares na Perspectiva Inclusiva – NAPNE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Nauvia Maria Cancelieri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9/06/2026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30/12/2027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As oficinas e tutorias ofertadas pelo NAPNE possibilitaram o apoio pedagógico especializado aos estudantes público-alvo da Educação Especial, favorecendo a inclusão e a acessibilidade no processo de ensino-aprendizagem. A ação fortaleceu a permanência e o sucesso acadêmico dos participantes, alinhando-se às políticas de educação inclusiva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