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Estudos e Práticas para Simulação de Organizações Internacionais e Direitos Humanos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Nicole Silva Los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8/08/2022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5/08/2022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1) Direitos Humanos e Justiça                  (   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A ação possibilitou aos estudantes do Técnico Integrado ao Ensino Médio a vivência de simulações de organizações internacionais, ampliando o entendimento sobre direitos humanos e temáticas diplomáticas. A abordagem prática contribuiu para o desenvolvimento de habilidades de argumentação e análise crítica entre os participante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