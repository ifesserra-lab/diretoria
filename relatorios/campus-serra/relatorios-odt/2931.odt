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Tutoria de Estudos Orientados: Compartilhando Sabere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Bruno Ramos Gonzaga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