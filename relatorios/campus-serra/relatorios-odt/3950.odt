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9E4000002DD200001128AEC3397BAA12FD7B.wmf" manifest:media-type="image/x-wmf"/>
  <manifest:file-entry manifest:full-path="Pictures/10000201000001BB000000A6C4CD48CB3AD81C43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503cm" fo:margin-left="0cm" table:align="left"/>
    </style:style>
    <style:style style:name="Tabela7.A" style:family="table-column">
      <style:table-column-properties style:column-width="4.546cm"/>
    </style:style>
    <style:style style:name="Tabela7.B" style:family="table-column">
      <style:table-column-properties style:column-width="3.552cm"/>
    </style:style>
    <style:style style:name="Tabela7.C" style:family="table-column">
      <style:table-column-properties style:column-width="8.405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2" style:family="table-row">
      <style:table-row-properties style:min-row-height="0.986cm"/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0.25pt solid #000000" fo:border-top="none" fo:border-bottom="0.25pt solid #000000"/>
    </style:style>
    <style:style style:name="Tabela11" style:family="table">
      <style:table-properties style:width="16.503cm" fo:margin-left="0cm" fo:break-before="auto" fo:break-after="auto" table:align="left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3.803cm"/>
    </style:style>
    <style:style style:name="Tabela11.C" style:family="table-column">
      <style:table-column-properties style:column-width="8.5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1.B3" style:family="table-cell">
      <style:table-cell-properties style:vertical-align="middle" fo:padding="0.097cm" fo:border="0.25pt solid #000000"/>
    </style:style>
    <style:style style:name="Tabela22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101cm"/>
    </style:style>
    <style:style style:name="Tabela22.B" style:family="table-column">
      <style:table-column-properties style:column-width="5.396cm"/>
    </style:style>
    <style:style style:name="Tabela22.C" style:family="table-column">
      <style:table-column-properties style:column-width="4.498cm"/>
    </style:style>
    <style:style style:name="Tabela22.D" style:family="table-column">
      <style:table-column-properties style:column-width="3.508cm"/>
    </style:style>
    <style:style style:name="Tabela22.1" style:family="table-row">
      <style:table-row-properties style:min-row-height="0.794cm"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none" fo:border-top="none" fo:border-bottom="0.25pt solid #000000"/>
    </style:style>
    <style:style style:name="Tabela22.C2" style:family="table-cell">
      <style:table-cell-properties fo:padding="0.097cm" fo:border-left="0.25pt solid #000000" fo:border-right="none" fo:border-top="none" fo:border-bottom="0.25pt solid #000000"/>
    </style:style>
    <style:style style:name="Tabel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9.495cm"/>
    </style:style>
    <style:style style:name="Tabela14.B" style:family="table-column">
      <style:table-column-properties style:column-width="7.011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-left="0.101cm" fo:padding-right="0.101cm" fo:padding-top="0cm" fo:padding-bottom="0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4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ela14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ela15" style:family="table">
      <style:table-properties style:width="16.501cm" fo:margin-left="0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6.306cm"/>
    </style:style>
    <style:style style:name="Tabela15.B" style:family="table-column">
      <style:table-column-properties style:column-width="1.588cm"/>
    </style:style>
    <style:style style:name="Tabela15.C" style:family="table-column">
      <style:table-column-properties style:column-width="2.111cm"/>
    </style:style>
    <style:style style:name="Tabela15.D" style:family="table-column">
      <style:table-column-properties style:column-width="3.196cm"/>
    </style:style>
    <style:style style:name="Tabela15.E" style:family="table-column">
      <style:table-column-properties style:column-width="3.3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D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5.E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2.085cm"/>
    </style:style>
    <style:style style:name="Tabela1.G" style:family="table-column">
      <style:table-column-properties style:column-width="2cm"/>
    </style:style>
    <style:style style:name="Tabela1.H" style:family="table-column">
      <style:table-column-properties style:column-width="2.002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1.3" style:family="table-row">
      <style:table-row-properties style:min-row-height="0.684cm"/>
    </style:style>
    <style:style style:name="Tabela1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E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1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2.085cm"/>
    </style:style>
    <style:style style:name="Tabela9.H" style:family="table-column">
      <style:table-column-properties style:column-width="1.91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C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E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9.3" style:family="table-row">
      <style:table-row-properties style:min-row-height="0.684cm"/>
    </style:style>
    <style:style style:name="Tabela9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B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D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F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G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9.H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5" style:family="table">
      <style:table-properties style:width="16.50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6.204cm"/>
    </style:style>
    <style:style style:name="Tabela5.B" style:family="table-column">
      <style:table-column-properties style:column-width="8.1cm"/>
    </style:style>
    <style:style style:name="Tabela5.C" style:family="table-column">
      <style:table-column-properties style:column-width="2.2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5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A6" style:family="table-cell">
      <style:table-cell-properties fo:padding="0.097cm" fo:border-left="0.25pt solid #000000" fo:border-right="none" fo:border-top="none" fo:border-bottom="0.25pt solid #000000"/>
    </style:style>
    <style:style style:name="Tabela5.B6" style:family="table-cell">
      <style:table-cell-properties fo:padding="0.097cm" fo:border-left="0.25pt solid #000000" fo:border-right="none" fo:border-top="none" fo:border-bottom="0.25pt solid #000000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6.202cm"/>
    </style:style>
    <style:style style:name="Tabela2.B" style:family="table-column">
      <style:table-column-properties style:column-width="10.3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506cm" fo:margin-left="0cm" table:align="left"/>
    </style:style>
    <style:style style:name="Tabela13.A" style:family="table-column">
      <style:table-column-properties style:column-width="16.506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2" style:family="table-row">
      <style:table-row-properties style:min-row-height="1.369cm"/>
    </style:style>
    <style:style style:name="Tabela13.A2" style:family="table-cell">
      <style:table-cell-properties style:vertical-align=""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503cm" fo:margin-left="0cm" fo:break-before="auto" fo:break-after="auto" table:align="left"/>
    </style:style>
    <style:style style:name="Tabela17.A" style:family="table-column">
      <style:table-column-properties style:column-width="8.251cm"/>
    </style:style>
    <style:style style:name="Tabela17.A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7.B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.50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50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.50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ns42:rsid="0034e133" ns42:paragraph-rsid="0078c66e" style:font-size-asian="10pt" style:font-weight-asian="bold" style:font-size-complex="10pt" style:font-weight-complex="bold"/>
    </style:style>
    <style:style style:name="P9" style:family="paragraph" style:parent-style-name="Titulo_5f_telefone">
      <style:text-properties fo:color="#000000" ns42:paragraph-rsid="000da9b3"/>
    </style:style>
    <style:style style:name="P10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ns42:paragraph-rsid="00e002ec" style:font-size-asian="10pt" style:font-size-complex="10pt"/>
    </style:style>
    <style:style style:name="P11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0139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139ee" ns42:paragraph-rsid="00ed4f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ns42:rsid="000d85d6" ns42:paragraph-rsid="00d40eb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3f23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86f9d" ns42:paragraph-rsid="003f23f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287cb" ns42:paragraph-rsid="00e002e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0a81ec" ns42:paragraph-rsid="00e002e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870ec" ns42:paragraph-rsid="00d870e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d938b9" ns42:paragraph-rsid="00f75c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5c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75c64" ns42:paragraph-rsid="00f7c6a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9093c" ns42:paragraph-rsid="00f9093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f6bf75" ns42:paragraph-rsid="00e002e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3d8a48" ns42:paragraph-rsid="00de983a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d938b9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paragraph-rsid="00f75c6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ns42:rsid="00ec8c71" ns42:paragraph-rsid="00ec8c71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2e9796" ns42:paragraph-rsid="0078c66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ns42:rsid="003fe3ce" ns42:paragraph-rsid="0078c66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rsid="000287cb" ns42:paragraph-rsid="00d40eb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ns42:paragraph-rsid="00f123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0a81ec" ns42:paragraph-rsid="00f6bf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81b34" ns42:paragraph-rsid="00fef36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0ec8c71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ns42:rsid="00ec8c71" ns42:paragraph-rsid="011a3878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870ec" style:font-size-asian="10pt" style:font-size-complex="10pt"/>
    </style:style>
    <style:style style:name="P4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style:font-size-asian="10pt" style:font-size-complex="10pt"/>
    </style:style>
    <style:style style:name="P4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93215" style:font-size-asian="10pt" style:font-size-complex="10pt"/>
    </style:style>
    <style:style style:name="P4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00de58" ns42:paragraph-rsid="00ed4f30" style:font-size-asian="10pt" style:font-size-complex="10pt"/>
    </style:style>
    <style:style style:name="P44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ns42:rsid="002464ae" ns42:paragraph-rsid="00e93215" style:font-size-asian="10pt" style:font-size-complex="10pt"/>
    </style:style>
    <style:style style:name="P4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5c64" ns42:paragraph-rsid="00f75c64" style:font-size-asian="10pt" style:font-size-complex="10pt"/>
    </style:style>
    <style:style style:name="P4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d870ec" style:font-size-asian="10pt" style:font-size-complex="10pt"/>
    </style:style>
    <style:style style:name="P4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1081b34" style:font-size-asian="10pt" style:font-size-complex="10pt"/>
    </style:style>
    <style:style style:name="P4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1081b34" ns42:paragraph-rsid="00f75c64" style:font-size-asian="10pt" style:font-size-complex="10pt"/>
    </style:style>
    <style:style style:name="P4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e519f8" fo:background-color="transparent" style:font-size-asian="10pt" style:font-size-complex="10pt"/>
    </style:style>
    <style:style style:name="P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e519f8" ns42:paragraph-rsid="00f75c64" fo:background-color="transparent" style:font-size-asian="10pt" style:font-size-complex="10pt"/>
    </style:style>
    <style:style style:name="P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d938b9" fo:background-color="transparent" style:font-size-asian="10pt" style:font-size-complex="10pt"/>
    </style:style>
    <style:style style:name="P5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paragraph-rsid="00f75c64" fo:background-color="transparent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f727ab" ns42:paragraph-rsid="010e986d" fo:background-color="transparent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ns42:rsid="000287cb" ns42:paragraph-rsid="010e986d" fo:background-color="transparent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d938b9" fo:background-color="transparent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text-underline-style="none" ns42:rsid="000a2eb5" ns42:paragraph-rsid="00f75c64" fo:background-color="transparent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0a2eb5" ns42:paragraph-rsid="009687e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fo:font-weight="normal" ns42:rsid="0038d10f" ns42:paragraph-rsid="009687e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0a2eb5" ns42:paragraph-rsid="009687e8" style:font-size-asian="10pt" style:font-size-complex="10pt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text-underline-style="none" ns42:rsid="00f727ab" ns42:paragraph-rsid="00f727ab" style:font-size-asian="10pt" style:font-size-complex="10pt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paragraph-rsid="00f123cd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d938b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0d938b9" ns42:paragraph-rsid="00f75c64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ns42:rsid="010ecd6d" ns42:paragraph-rsid="010ecd6d" fo:background-color="transparent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0d2eb" ns42:paragraph-rsid="00f0d2eb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0139ee" ns42:paragraph-rsid="00f75c64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bold" ns42:rsid="00f7c6aa" ns42:paragraph-rsid="00f7c6aa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style:text-underline-style="none" ns42:rsid="00f727ab" ns42:paragraph-rsid="00f727ab" style:font-size-asian="8pt" style:font-size-complex="8pt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0f7c6aa" style:font-size-asian="9pt" style:font-size-complex="9pt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9pt" ns42:rsid="000287cb" ns42:paragraph-rsid="010e986d" style:font-size-asian="9pt" style:font-size-complex="9pt"/>
    </style:style>
    <style:style style:name="P7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7pt" ns42:rsid="0090a98c" ns42:paragraph-rsid="00f75c64" style:font-size-asian="7pt" style:font-size-complex="7pt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text-line-through-style="none" style:text-line-through-type="none" style:font-name="Arial" fo:font-size="10pt" fo:font-weight="normal" ns42:rsid="00bc467b" ns42:paragraph-rsid="00f6bf75" fo:background-color="transparent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text-line-through-style="none" style:text-line-through-type="none" style:font-name="Arial" fo:font-size="8pt" fo:font-weight="normal" ns42:rsid="004a49a7" ns42:paragraph-rsid="00f6bf75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paragraph-rsid="007879c6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b69d31" ns42:paragraph-rsid="00b69d3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98d601" ns42:paragraph-rsid="00f7c6a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0f7c6aa" ns42:paragraph-rsid="00f7c6a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7ff89f" ns42:paragraph-rsid="00f9093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0f9093c" ns42:paragraph-rsid="00f9093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4157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81b34" ns42:paragraph-rsid="007879c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0f7c6a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93476" ns42:paragraph-rsid="0109347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9347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normal" ns42:rsid="010a13b9" ns42:paragraph-rsid="010a13b9" style:font-size-asian="8.75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ns42:rsid="0090a98c" ns42:paragraph-rsid="00f75c64" style:font-size-asian="10pt" style:font-size-complex="10pt"/>
    </style:style>
    <style:style style:name="P91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rsid="007ff89f" ns42:paragraph-rsid="00f9093c" style:font-size-asian="10pt" style:font-size-complex="10pt"/>
    </style:style>
    <style:style style:name="P9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font-name="Arial" fo:font-size="10pt" fo:font-weight="bold" ns42:paragraph-rsid="00f7c6aa" style:font-size-asian="10pt" style:font-size-complex="10pt"/>
    </style:style>
    <style:style style:name="P93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10pt" fo:font-weight="bold" ns42:rsid="004cb7e8" ns42:paragraph-rsid="00f9093c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1a96c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8pt" fo:font-weight="normal" ns42:rsid="007bd805" ns42:paragraph-rsid="0085301d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text-align="center" style:justify-single-word="false"/>
      <style:text-properties style:font-name="Arial" fo:font-size="9pt" fo:font-weight="normal" ns42:rsid="004cb7e8" ns42:paragraph-rsid="00f9093c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d870e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139ee" ns42:paragraph-rsid="00f75c6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bold" ns42:rsid="000139ee" ns42:paragraph-rsid="0078c66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ns42:rsid="0000de58" ns42:paragraph-rsid="00d938b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ns42:rsid="0034e133" ns42:paragraph-rsid="0078c66e" style:font-size-asian="10pt" style:font-weight-asian="normal" style:font-size-complex="10pt" style:font-weight-complex="normal"/>
    </style:style>
    <style:style style:name="P104" style:family="paragraph" style:parent-style-name="espacamento_5f_brasao">
      <style:text-properties fo:color="#000000" ns42:paragraph-rsid="000da9b3"/>
    </style:style>
    <style:style style:name="P105" style:family="paragraph" style:parent-style-name="Standard">
      <style:paragraph-properties fo:line-height="150%"/>
      <style:text-properties fo:color="#000000" style:font-name="Arial" fo:font-size="10pt" fo:language="pt" fo:country="BR" fo:font-style="normal" style:text-underline-style="none" fo:font-weight="normal" ns42:rsid="0020382b" ns42:paragraph-rsid="00eaa096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pt" style:country-complex="BR" style:font-weight-complex="normal"/>
    </style:style>
    <style:style style:name="P107" style:family="paragraph" style:parent-style-name="Standard">
      <style:text-properties fo:color="#000000" style:font-name="Arial" fo:font-size="10pt" fo:font-weight="bold" ns42:rsid="000139ee" ns42:paragraph-rsid="011e33c3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000000" style:font-name="Arial" fo:font-size="2pt" fo:font-style="italic" fo:font-weight="normal" ns42:rsid="0036b6fc" ns42:paragraph-rsid="00f7c6aa" style:font-size-asian="1.75pt" style:font-style-asian="italic" style:font-weight-asian="normal" style:font-size-complex="2pt" style:font-style-complex="italic" style:font-weight-complex="normal"/>
    </style:style>
    <style:style style:name="P109" style:family="paragraph" style:parent-style-name="Standard">
      <style:text-properties fo:color="#000000" style:font-name="Arial" fo:font-size="9pt" fo:font-weight="normal" ns42:rsid="00f9093c" ns42:paragraph-rsid="011e33c3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0pt" fo:font-weight="bold" ns42:rsid="012c33d8" ns42:paragraph-rsid="012c33d8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ns42:paragraph-rsid="00de28c9"/>
    </style:style>
    <style:style style:name="P114" style:family="paragraph" style:parent-style-name="Standard">
      <style:text-properties ns42:paragraph-rsid="00f7c6aa"/>
    </style:style>
    <style:style style:name="P115" style:family="paragraph" style:parent-style-name="Standard">
      <style:text-properties ns42:paragraph-rsid="00f9093c"/>
    </style:style>
    <style:style style:name="P116" style:family="paragraph" style:parent-style-name="Standard">
      <style:paragraph-properties fo:text-align="center" style:justify-single-word="false"/>
    </style:style>
    <style:style style:name="P117" style:family="paragraph" style:parent-style-name="Text_20_body">
      <style:paragraph-properties fo:text-align="center" style:justify-single-word="false"/>
      <style:text-properties fo:color="#000000" style:font-name="Arial" fo:font-size="8pt" fo:font-weight="normal" ns42:rsid="00795e7e" ns42:paragraph-rsid="004fdc79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color="#000000" fo:font-size="10pt" fo:font-weight="bold" ns42:paragraph-rsid="003ff69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f727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a96f4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ns42:rsid="01081b34" ns42:paragraph-rsid="01081b3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.048cm" fo:margin-right="0.254cm" fo:margin-top="0.049cm" fo:margin-bottom="0.049cm" loext:contextual-spacing="false" fo:line-height="100%" fo:text-align="start" style:justify-single-word="false" fo:text-indent="0cm" style:auto-text-indent="false" text:number-lines="false" text:line-number="0"/>
      <style:text-properties fo:color="#000000" style:font-name="Arial" fo:font-size="10pt" fo:font-weight="normal" ns42:rsid="008e9731" ns42:paragraph-rsid="009687e8" fo:background-color="transparent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Arial" fo:font-size="10pt" fo:font-weight="normal" ns42:rsid="008e9731" ns42:paragraph-rsid="00a96f4d" fo:background-color="transparent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top="0.049cm" fo:margin-bottom="0.049cm" loext:contextual-spacing="false" fo:line-height="100%"/>
      <style:text-properties fo:font-variant="normal" fo:text-transform="none" fo:color="#000000" style:font-name="Arial" fo:font-size="10pt" fo:letter-spacing="normal" fo:font-style="normal" fo:font-weight="bold" ns42:rsid="000139ee" ns42:paragraph-rsid="00ed4f30" style:letter-kerning="true" style:font-name-asian="Times New Roman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ns42:rsid="000be2a5" style:font-weight-asian="bold" style:font-weight-complex="bold"/>
    </style:style>
    <style:style style:name="T3" style:family="text">
      <style:text-properties fo:font-weight="bold" ns42:rsid="00e93215" style:font-weight-asian="bold" style:font-weight-complex="bold"/>
    </style:style>
    <style:style style:name="T4" style:family="text">
      <style:text-properties fo:font-weight="bold" ns42:rsid="00f123c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ns42:rsid="00d870ec" fo:background-color="transparent" loext:char-shading-value="0" style:font-weight-asian="bold" style:font-weight-complex="bold"/>
    </style:style>
    <style:style style:name="T7" style:family="text">
      <style:text-properties ns42:rsid="002464ae"/>
    </style:style>
    <style:style style:name="T8" style:family="text">
      <style:text-properties ns42:rsid="0026e873"/>
    </style:style>
    <style:style style:name="T10" style:family="text">
      <style:text-properties style:font-name="Arial" ns42:rsid="003a944a"/>
    </style:style>
    <style:style style:name="T11" style:family="text">
      <style:text-properties style:font-name="Arial" ns42:rsid="00f6bf75"/>
    </style:style>
    <style:style style:name="T12" style:family="text">
      <style:text-properties ns42:rsid="00386f9d"/>
    </style:style>
    <style:style style:name="T13" style:family="text">
      <style:text-properties ns42:rsid="00450119"/>
    </style:style>
    <style:style style:name="T14" style:family="text">
      <style:text-properties ns42:rsid="008fd89c"/>
    </style:style>
    <style:style style:name="T15" style:family="text">
      <style:text-properties ns42:rsid="0097f957"/>
    </style:style>
    <style:style style:name="T16" style:family="text">
      <style:text-properties fo:font-size="8pt" ns42:rsid="00f75c64" style:font-size-asian="8pt" style:font-size-complex="8pt"/>
    </style:style>
    <style:style style:name="T17" style:family="text">
      <style:text-properties ns42:rsid="00962059"/>
    </style:style>
    <style:style style:name="T25" style:family="text">
      <style:text-properties ns42:rsid="00e002ec"/>
    </style:style>
    <style:style style:name="T26" style:family="text">
      <style:text-properties ns42:rsid="00e93215"/>
    </style:style>
    <style:style style:name="T27" style:family="text">
      <style:text-properties ns42:rsid="00f123cd"/>
    </style:style>
    <style:style style:name="T28" style:family="text">
      <style:text-properties ns42:rsid="00f6bf75"/>
    </style:style>
    <style:style style:name="T29" style:family="text">
      <style:text-properties ns42:rsid="0060fad6"/>
    </style:style>
    <style:style style:name="T30" style:family="text">
      <style:text-properties ns42:rsid="00462244"/>
    </style:style>
    <style:style style:name="T31" style:family="text">
      <style:text-properties ns42:rsid="00f75c64"/>
    </style:style>
    <style:style style:name="T32" style:family="text">
      <style:text-properties ns42:rsid="00ab1f42"/>
    </style:style>
    <style:style style:name="T33" style:family="text">
      <style:text-properties ns42:rsid="009687e8"/>
    </style:style>
    <style:style style:name="T34" style:family="text">
      <style:text-properties ns42:rsid="00b69d31"/>
    </style:style>
    <style:style style:name="T35" style:family="text">
      <style:text-properties ns42:rsid="003d8a48"/>
    </style:style>
    <style:style style:name="T36" style:family="text">
      <style:text-properties ns42:rsid="0086b4df"/>
    </style:style>
    <style:style style:name="T37" style:family="text">
      <style:text-properties ns42:rsid="00f7c6aa"/>
    </style:style>
    <style:style style:name="T38" style:family="text">
      <style:text-properties ns42:rsid="00f9093c"/>
    </style:style>
    <style:style style:name="T39" style:family="text">
      <style:text-properties ns42:rsid="010ecd6d"/>
    </style:style>
    <style:style style:name="T40" style:family="text">
      <style:text-properties ns42:rsid="011782d2"/>
    </style:style>
    <style:style style:name="T41" style:family="text">
      <style:text-properties ns42:rsid="010e986d"/>
    </style:style>
    <style:style style:name="T42" style:family="text">
      <style:text-properties ns42:rsid="01195727"/>
    </style:style>
    <style:style style:name="T54" style:family="text">
      <style:text-properties ns42:rsid="012c33d8"/>
    </style:style>
    <style:style style:name="T55" style:family="text">
      <style:text-properties ns42:rsid="013227e6"/>
    </style:style>
    <style:style style:name="T59" style:family="text">
      <style:text-properties ns42:rsid="01399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Figura1" text:anchor-type="as-char" svg:width="11.73cm" svg:height="4.392cm" draw:z-index="0"><draw:image xlink:href="Pictures/10089E4000002DD200001128AEC3397BAA12FD7B.wmf" xlink:type="simple" xlink:show="embed" xlink:actuate="onLoad" loext:mime-type="image/x-wmf"/><draw:image xlink:href="Pictures/10000201000001BB000000A6C4CD48CB3AD81C43.png" xlink:type="simple" xlink:show="embed" xlink:actuate="onLoad" loext:mime-type="image/png"/></draw:frame></text:p>
      <text:p text:style-name="P9"/>
      <text:p text:style-name="P9"/>
      <text:p text:style-name="P118"><text:span text:style-name="T11">RELATÓRIO D</text:span><text:span text:style-name="T10">E </text:span><text:span text:style-name="T11">AÇÃO</text:span><text:span text:style-name="T10"> DE EXTENSÃO</text:span></text:p>
      <text:p text:style-name="P117">ORIENTAÇÃO NORMATIVA C<text:span text:style-name="T17">AEX 01-</text:span>20<text:span text:style-name="T40">20 – </text:span>INSTITUCIONALIZAÇÃO DE <text:span text:style-name="T14">A</text:span>ÇÕES DE <text:span text:style-name="T14">E</text:span>XTENSÃO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5">Identif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Título <text:span text:style-name="T12">da Ação:</text:span></text:p>
          </table:table-cell>
          <table:table-cell table:style-name="Tabela7.B2" table:number-columns-spanned="2" office:value-type="string">
            <text:p>Oficina de Tutoria em Matemática</text:p>
          </table:table-cell>
          <table:covered-table-cell/>
        </table:table-row>
        <table:table-row>
          <table:table-cell table:style-name="Tabela7.A2" office:value-type="string">
            <text:p text:style-name="P16"><text:span text:style-name="T28">Nome</text:span> do </text:p>
            <text:p text:style-name="P17">Coordenador</text:p>
          </table:table-cell>
          <table:table-cell table:style-name="Tabela7.B3" table:number-columns-spanned="2" office:value-type="string">
            <text:p>Paulo Cezar Camargo Guedes</text:p>
          </table:table-cell>
          <table:covered-table-cell/>
        </table:table-row>
        <table:table-row>
          <table:table-cell table:style-name="Tabela7.A2" table:number-rows-spanned="2" office:value-type="string">
            <text:p text:style-name="P1">Período de <text:span text:style-name="T28">referência deste relatório</text:span></text:p>
          </table:table-cell>
          <table:table-cell table:style-name="Tabela7.B4" office:value-type="string">
            <text:p text:style-name="P30"><text:span text:style-name="T15">Início</text:span>: </text:p>
          </table:table-cell>
          <table:table-cell table:style-name="Tabela7.C4" office:value-type="string">
            <text:p text:style-name="P103"><text:tab/> <text:s text:c="5"/>/ <text:s text:c="9"/>/</text:p>
          </table:table-cell>
        </table:table-row>
        <table:table-row>
          <table:covered-table-cell/>
          <table:table-cell table:style-name="Tabela7.B5" office:value-type="string">
            <text:p text:style-name="P31"><text:span text:style-name="T15">Término</text:span>: </text:p>
          </table:table-cell>
          <table:table-cell table:style-name="Tabela7.C5" office:value-type="string">
            <text:p text:style-name="P103"><text:tab/> <text:s text:c="5"/>/ <text:s text:c="9"/>/</text:p>
          </table:table-cell>
        </table:table-row>
        <table:table-row>
          <table:table-cell table:style-name="Tabela7.A2" office:value-type="string">
            <text:p text:style-name="P112">Tipo de relatório</text:p>
          </table:table-cell>
          <table:table-cell table:style-name="Tabela7.B6" table:number-columns-spanned="2" office:value-type="string">
            <text:p>Parcial (X) Final ( )</text:p>
          </table:table-cell>
          <table:covered-table-cell/>
        </table:table-row>
      </table:table>
      <text:p text:style-name="P9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8">Informações <text:span text:style-name="T27">G</text:span>erais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5">Abrangência</text:p>
            <text:p text:style-name="P73">(considerar o período <text:span text:style-name="T29">de referência deste relatório</text:span>)</text:p>
          </table:table-cell>
          <table:table-cell table:style-name="Tabela11.B2" office:value-type="string">
            <text:p text:style-name="P72">Nomes de tod<text:span text:style-name="T55">o</text:span>s <text:span text:style-name="T54">os municípios</text:span> envolvid<text:span text:style-name="T54">o</text:span>s:</text:p>
          </table:table-cell>
          <table:table-cell table:style-name="Tabela11.C2" office:value-type="string">
            <text:p text:style-name="P35"/>
          </table:table-cell>
        </table:table-row>
        <table:table-row>
          <table:table-cell table:style-name="Tabela11.A3" office:value-type="string">
            <text:p text:style-name="P19">Está vinculad<text:span text:style-name="T25">a</text:span> a <text:span text:style-name="T25">outra ação institucional mais abrangente?</text:span></text:p>
          </table:table-cell>
          <table:table-cell table:style-name="Tabela11.B3" table:number-columns-spanned="2" office:value-type="string">
            <text:p text:style-name="P34"><text:span text:style-name="T7">( <text:s text:c="2"/>) </text:span>Sim <text:s text:c="4"/><text:span text:style-name="T7">( <text:s text:c="2"/>) </text:span>Não</text:p>
          </table:table-cell>
          <table:covered-table-cell/>
        </table:table-row>
      </table:table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33"><text:s/><text:span text:style-name="T2">Áreas </text:span><text:span text:style-name="T4">Temática de Extensão</text:span></text:p>
            <text:p text:style-name="P61"><text:span text:style-name="T4">(</text:span><text:span text:style-name="T3">assinale 1 para área principal e 2 para área secundária</text:span><text:span text:style-name="T4">)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( <text:s text:c="2"/>) Comunicação</text:p>
            <text:p text:style-name="P42"><text:span text:style-name="T7">( <text:s text:c="2"/>) </text:span>Cultura</text:p>
          </table:table-cell>
          <table:table-cell table:style-name="Tabela22.B2" office:value-type="string">
            <text:p>(   ) Direitos Humanos e Justiça                  (1) Educação</text:p>
          </table:table-cell>
          <table:table-cell table:style-name="Tabela22.C2" office:value-type="string">
            <text:p text:style-name="P42"><text:span text:style-name="T7">( <text:s text:c="2"/>) </text:span>Tecnologia e Produçã<text:span text:style-name="T26">o</text:span></text:p>
            <text:p text:style-name="P42"><text:span text:style-name="T26">( <text:s text:c="2"/>)</text:span> Trabalho </text:p>
          </table:table-cell>
          <table:table-cell table:style-name="Tabela22.D2" office:value-type="string">
            <text:p text:style-name="P43"><text:span text:style-name="T7">( <text:s text:c="2"/>) </text:span>Meio Ambiente</text:p>
            <text:p text:style-name="P43"><text:span text:style-name="T7">( <text:s text:c="2"/>) </text:span>Saúde</text:p>
          </table:table-cell>
        </table:table-row>
      </table:table>
      <text:p text:style-name="P1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2"><text:span text:style-name="T1">Públic</text:span><text:span text:style-name="T5">o </text:span><text:span text:style-name="T6">Externo</text:span></text:p>
          </table:table-cell>
          <table:covered-table-cell/>
        </table:table-row>
        <table:table-row>
          <table:table-cell table:style-name="Tabela14.A2" office:value-type="string">
            <text:p text:style-name="P57"><text:span text:style-name="T13">Público de i</text:span>nstituições <text:span text:style-name="T30">educacionais externas</text:span>: </text:p>
          </table:table-cell>
          <table:table-cell table:style-name="Tabela14.B2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8"><text:span text:style-name="T13">Público de o</text:span>rganizações não governamentais: </text:p>
          </table:table-cell>
          <table:table-cell table:style-name="Tabela14.B3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empresas</text:span>: </text:p>
          </table:table-cell>
          <table:table-cell table:style-name="Tabela14.B4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59"><text:span text:style-name="T13">Público de g</text:span>rupos <text:span text:style-name="T13">c</text:span>omunitários: </text:p>
          </table:table-cell>
          <table:table-cell table:style-name="Tabela14.B6" office:value-type="string">
            <text:p text:style-name="P120">( <text:s text:c="4"/>) Sim <text:s text:c="9"/>( <text:s text:c="4"/>) Não</text:p>
          </table:table-cell>
        </table:table-row>
        <table:table-row>
          <table:table-cell table:style-name="Tabela14.A6" office:value-type="string">
            <text:p text:style-name="P60">Outros tipos de público:</text:p>
            <text:p text:style-name="P68">(se houver, descreva ao lado)</text:p>
          </table:table-cell>
          <table:table-cell table:style-name="Tabela14.B6" office:value-type="string">
            <text:p text:style-name="P122"/>
          </table:table-cell>
        </table:table-row>
        <table:table-row>
          <table:table-cell table:style-name="Tabela14.A9" office:value-type="string">
            <text:p text:style-name="P60">Número de pessoas do público externo da ação com registro de participação:</text:p>
            <text:p text:style-name="P68">(considerar inscrições, matrículas, listas de presença e certificados ou outros documentos que contenham a identificação de cada participante)</text:p>
          </table:table-cell>
          <table:table-cell table:style-name="Tabela14.B9" office:value-type="string">
            <text:p>0</text:p>
          </table:table-cell>
        </table:table-row>
        <table:table-row>
          <table:table-cell table:style-name="Tabela14.A9" office:value-type="string">
            <text:p text:style-name="P123">O público-alvo compreende<text:span text:style-name="T41">u</text:span> grupos sociais em situação de vulnerabilidade?</text:p>
          </table:table-cell>
          <table:table-cell table:style-name="Tabela14.B9" office:value-type="string">
            <text:p text:style-name="P119">( <text:s text:c="4"/>) Sim <text:s text:c="9"/>( <text:s text:c="4"/>) Não</text:p>
          </table:table-cell>
        </table:table-row>
        <table:table-row>
          <table:table-cell table:style-name="Tabela14.A9" office:value-type="string">
            <text:p text:style-name="P126">A ação de <text:span text:style-name="T32">e</text:span>xtensão <text:span text:style-name="T41">foi</text:span> dirigida a alguma escola pública ou possui alguma escola pública como parceira desta ação?</text:p>
          </table:table-cell>
          <table:table-cell table:style-name="Tabela14.B9" office:value-type="string">
            <text:p text:style-name="P121">( <text:s text:c="4"/>) Sim <text:s text:c="9"/>( <text:s text:c="4"/>) Não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0">Organizações <text:span text:style-name="T27">P</text:span>arceiras / <text:span text:style-name="T27">C</text:span>oexecutoras / <text:span text:style-name="T27">A</text:span>poiadoras / <text:span text:style-name="T27">P</text:span>atrocinadoras</text:p>
            <text:p text:style-name="P65">(caso seja necessário, inserir mais linhas na tabel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0">Nome da instituição</text:p>
          </table:table-cell>
          <table:table-cell table:style-name="Tabela15.B2" office:value-type="string">
            <text:p text:style-name="P40">Sigla</text:p>
          </table:table-cell>
          <table:table-cell table:style-name="Tabela15.C2" office:value-type="string">
            <text:p text:style-name="P53">Aportou recursos</text:p>
            <text:p text:style-name="P54"><text:span text:style-name="T41">financeiros</text:span>?</text:p>
          </table:table-cell>
          <table:table-cell table:style-name="Tabela15.D2" office:value-type="string">
            <text:p text:style-name="P45">Valor (R$)</text:p>
            <text:p text:style-name="P41"><text:span text:style-name="T16">(Formato: 0.000,00)</text:span> </text:p>
          </table:table-cell>
          <table:table-cell table:style-name="Tabela15.E2" office:value-type="string">
            <text:p text:style-name="P90">Instrumento Formal</text:p>
            <text:p text:style-name="P71">(Convênio, contrato, acordo de cooperação ou termo de intenções)</text:p>
          </table:table-cell>
        </table:table-row>
        <table:table-row>
          <table:table-cell table:style-name="Tabela15.A3" office:value-type="string">
            <text:p text:style-name="P46"/>
          </table:table-cell>
          <table:table-cell table:style-name="Tabela15.B3" office:value-type="string">
            <text:p text:style-name="P48"/>
          </table:table-cell>
          <table:table-cell table:style-name="Tabela15.C3" office:value-type="string">
            <text:p text:style-name="P70"><text:span text:style-name="T8"><text:s text:c="3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3" office:value-type="string">
            <text:p text:style-name="P47"/>
          </table:table-cell>
          <table:table-cell table:style-name="Tabela15.E3" office:value-type="string">
            <text:p text:style-name="P46"/>
          </table:table-cell>
        </table:table-row>
        <table:table-row>
          <table:table-cell table:style-name="Tabela15.A4" office:value-type="string">
            <text:p text:style-name="P47"/>
          </table:table-cell>
          <table:table-cell table:style-name="Tabela15.B4" office:value-type="string">
            <text:p text:style-name="P47"/>
          </table:table-cell>
          <table:table-cell table:style-name="Tabela15.C4" office:value-type="string">
            <text:p text:style-name="P70"><text:span text:style-name="T8"><text:s text:c="2"/>( <text:s text:c="2"/>) </text:span>Sim <text:s text:c="2"/></text:p>
            <text:p text:style-name="P70"><text:span text:style-name="T8">( <text:s text:c="2"/>) </text:span>Não</text:p>
          </table:table-cell>
          <table:table-cell table:style-name="Tabela15.D4" office:value-type="string">
            <text:p text:style-name="P46"/>
          </table:table-cell>
          <table:table-cell table:style-name="Tabela15.E4" office:value-type="string">
            <text:p text:style-name="P47"/>
          </table:table-cell>
        </table:table-row>
      </table:table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21">Público interno participante</text:p>
            <text:p text:style-name="P66">(<text:span text:style-name="T33">Quantitativo</text:span> <text:span text:style-name="T13">de pessoas, exceto equipe executora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3">Estudantes de curso FIC</text:p>
          </table:table-cell>
          <table:table-cell table:style-name="Tabela1.B2" office:value-type="string">
            <text:p text:style-name="P63">Estudantes de curso técnico</text:p>
          </table:table-cell>
          <table:table-cell table:style-name="Tabela1.C2" office:value-type="string">
            <text:p text:style-name="P63">Estudantes de graduação</text:p>
          </table:table-cell>
          <table:table-cell table:style-name="Tabela1.D2" office:value-type="string">
            <text:p text:style-name="P63">Estudantes de pós-graduação</text:p>
          </table:table-cell>
          <table:table-cell table:style-name="Tabela1.E2" office:value-type="string">
            <text:p text:style-name="P63">Servidores</text:p>
            <text:p text:style-name="P63">docentes</text:p>
          </table:table-cell>
          <table:table-cell table:style-name="Tabela1.F2" office:value-type="string">
            <text:p text:style-name="P63">Servidores técnico-administrativos</text:p>
          </table:table-cell>
          <table:table-cell table:style-name="Tabela1.G2" office:value-type="string">
            <text:p text:style-name="P64">Outros</text:p>
          </table:table-cell>
          <table:table-cell table:style-name="Tabela1.H2" office:value-type="string">
            <text:p text:style-name="P63"/>
            <text:p text:style-name="P28">Total</text:p>
          </table:table-cell>
        </table:table-row>
        <table:table-row table:style-name="Tabela1.3">
          <table:table-cell table:style-name="Tabela1.A3" office:value-type="string">
            <text:p text:style-name="P56"><text:s/></text:p>
          </table:table-cell>
          <table:table-cell table:style-name="Tabela1.B3" office:value-type="string">
            <text:p text:style-name="P52"/>
          </table:table-cell>
          <table:table-cell table:style-name="Tabela1.E3" office:value-type="string">
            <text:p text:style-name="P52"/>
          </table:table-cell>
          <table:table-cell table:style-name="Tabela1.D3" office:value-type="string">
            <text:p text:style-name="P52"/>
          </table:table-cell>
          <table:table-cell table:style-name="Tabela1.E3" office:value-type="string">
            <text:p text:style-name="P50"/>
          </table:table-cell>
          <table:table-cell table:style-name="Tabela1.F3" office:value-type="string">
            <text:p text:style-name="P52"/>
          </table:table-cell>
          <table:table-cell table:style-name="Tabela1.G3" office:value-type="string">
            <text:p text:style-name="P52"/>
          </table:table-cell>
          <table:table-cell table:style-name="Tabela1.H3" office:value-type="string">
            <text:p text:style-name="P5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B"/>
        <table:table-column table:style-name="Tabela9.A"/>
        <table:table-column table:style-name="Tabela9.H"/>
        <table:table-row table:style-name="Tabela9.1">
          <table:table-cell table:style-name="Tabela9.A1" table:number-columns-spanned="8" office:value-type="string">
            <text:p text:style-name="P22">Equipe executora</text:p>
            <text:p text:style-name="P66">(<text:span text:style-name="T37">quantitativo</text:span> <text:span text:style-name="T13">de pessoas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62">Estudantes de curso FIC</text:p>
          </table:table-cell>
          <table:table-cell table:style-name="Tabela9.B2" office:value-type="string">
            <text:p text:style-name="P62">Estudantes de curso técnico</text:p>
          </table:table-cell>
          <table:table-cell table:style-name="Tabela9.C2" office:value-type="string">
            <text:p text:style-name="P62">Estudantes de graduação</text:p>
          </table:table-cell>
          <table:table-cell table:style-name="Tabela9.D2" office:value-type="string">
            <text:p text:style-name="P62">Estudantes de pós-graduação</text:p>
          </table:table-cell>
          <table:table-cell table:style-name="Tabela9.E2" office:value-type="string">
            <text:p text:style-name="P62">Servidores</text:p>
            <text:p text:style-name="P62">docentes</text:p>
          </table:table-cell>
          <table:table-cell table:style-name="Tabela9.F2" office:value-type="string">
            <text:p text:style-name="P62">Servidores técnico-administrativos</text:p>
          </table:table-cell>
          <table:table-cell table:style-name="Tabela9.G2" office:value-type="string">
            <text:p text:style-name="P62">Colaboradores externos</text:p>
          </table:table-cell>
          <table:table-cell table:style-name="Tabela9.H2" office:value-type="string">
            <text:p text:style-name="P27">Total</text:p>
          </table:table-cell>
        </table:table-row>
        <table:table-row table:style-name="Tabela9.3">
          <table:table-cell table:style-name="Tabela9.A3" office:value-type="string">
            <text:p text:style-name="P55"><text:s/></text:p>
          </table:table-cell>
          <table:table-cell table:style-name="Tabela9.B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D3" office:value-type="string">
            <text:p text:style-name="P51"/>
          </table:table-cell>
          <table:table-cell table:style-name="Tabela9.G3" office:value-type="string">
            <text:p text:style-name="P49"/>
          </table:table-cell>
          <table:table-cell table:style-name="Tabela9.F3" office:value-type="string">
            <text:p text:style-name="P51"/>
          </table:table-cell>
          <table:table-cell table:style-name="Tabela9.G3" office:value-type="string">
            <text:p text:style-name="P51"/>
          </table:table-cell>
          <table:table-cell table:style-name="Tabela9.H3" office:value-type="string">
            <text:p text:style-name="P116"/>
          </table:table-cell>
        </table:table-row>
      </table:table>
      <text:p text:style-name="P10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">Detalhamento das atividades executada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74"><text:span text:style-name="T34">Descrição das a</text:span>tividade<text:span text:style-name="T35">s</text:span></text:p>
            <text:p text:style-name="P94">(<text:span text:style-name="T34">identificar a atividade</text:span>)</text:p>
          </table:table-cell>
          <table:table-cell table:style-name="Tabela5.B2" office:value-type="string">
            <text:p text:style-name="P75">Relato da execução das atividades</text:p>
            <text:p text:style-name="P95">(descrever <text:span text:style-name="T36">como foram realizadas as</text:span> atividade<text:span text:style-name="T36">s</text:span> prevista<text:span text:style-name="T36">s</text:span> no formulário de cadastro e o período de execução de cada atividade. <text:span text:style-name="T31">Caso alguma atividade tenha sido prevista e não executada, justificar.</text:span>)</text:p>
          </table:table-cell>
          <table:table-cell table:style-name="Tabela5.C2" office:value-type="string">
            <text:p text:style-name="P78">É atividade curricular de extensão?</text:p>
          </table:table-cell>
        </table:table-row>
        <table:table-row>
          <table:table-cell table:style-name="Tabela5.A6" office:value-type="string">
            <text:p text:style-name="P86"/>
          </table:table-cell>
          <table:table-cell table:style-name="Tabela5.B3" office:value-type="string">
            <text:p text:style-name="P81"/>
          </table:table-cell>
          <table:table-cell table:style-name="Tabela5.C3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1"/>
          </table:table-cell>
          <table:table-cell table:style-name="Tabela5.B4" office:value-type="string">
            <text:p text:style-name="P86"/>
          </table:table-cell>
          <table:table-cell table:style-name="Tabela5.C4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2"/>
          </table:table-cell>
          <table:table-cell table:style-name="Tabela5.B5" office:value-type="string">
            <text:p text:style-name="P82"/>
          </table:table-cell>
          <table:table-cell table:style-name="Tabela5.C5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  <table:table-row>
          <table:table-cell table:style-name="Tabela5.A6" office:value-type="string">
            <text:p text:style-name="P83"/>
          </table:table-cell>
          <table:table-cell table:style-name="Tabela5.B6" office:value-type="string">
            <text:p text:style-name="P75"/>
          </table:table-cell>
          <table:table-cell table:style-name="Tabela5.C6" office:value-type="string">
            <text:p text:style-name="P69"><text:span text:style-name="T8">( <text:s text:c="2"/>) </text:span>Sim</text:p>
            <text:p text:style-name="P69"><text:span text:style-name="T8">( <text:s text:c="2"/>) </text:span>Não</text:p>
          </table:table-cell>
        </table:table-row>
      </table:table>
      <text:p text:style-name="P11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24">Integração com o Ensino e a Pesquisa</text:p>
            </table:table-cell>
            <table:covered-table-cell/>
          </table:table-row>
        </table:table-header-rows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P</text:span>esquisa:</text:p>
          </table:table-cell>
          <table:table-cell table:style-name="Tabela2.B3" office:value-type="string">
            <text:p text:style-name="P87"/>
            <text:p text:style-name="P91"/>
          </table:table-cell>
        </table:table-row>
        <table:table-row>
          <table:table-cell table:style-name="Tabela2.A3" office:value-type="string">
            <text:p text:style-name="P79"><text:span text:style-name="T37">Descreva ao lado as formas de </text:span>integração <text:span text:style-name="T37">desta ação com Ensino</text:span>:</text:p>
          </table:table-cell>
          <table:table-cell table:style-name="Tabela2.B3" office:value-type="string">
            <text:p text:style-name="P88"/>
          </table:table-cell>
        </table:table-row>
      </table:table>
      <text:p text:style-name="P11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3">De<text:span text:style-name="T37">scrição dos resultados e impactos da execução da ação</text:span></text:p>
            <text:p text:style-name="P67">(descreva abaixo)</text:p>
          </table:table-cell>
        </table:table-row>
        <table:table-row table:style-name="Tabela13.2">
          <table:table-cell table:style-name="Tabela13.A2" office:value-type="string">
            <text:p text:style-name="P89"/>
          </table:table-cell>
        </table:table-row>
      </table:table>
      <text:p text:style-name="Text_20_body"/>
      <text:p text:style-name="Text_20_body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P93">Produtos resultantes </text:p>
            <text:p text:style-name="P96">(quantidade)</text:p>
          </table:table-cell>
          <table:covered-table-cell/>
        </table:table-row>
        <table:table-row>
          <table:table-cell table:style-name="Tabela17.A2" office:value-type="string">
            <text:p text:style-name="P77">Artigos:</text:p>
          </table:table-cell>
          <table:table-cell table:style-name="Tabela17.B2" office:value-type="string">
            <text:p text:style-name="P86"/>
          </table:table-cell>
        </table:table-row>
        <table:table-row>
          <table:table-cell table:style-name="Tabela17.A3" office:value-type="string">
            <text:p text:style-name="P77">Livros:</text:p>
          </table:table-cell>
          <table:table-cell table:style-name="Tabela17.B3" office:value-type="string">
            <text:p text:style-name="P86"/>
          </table:table-cell>
        </table:table-row>
        <table:table-row>
          <table:table-cell table:style-name="Tabela17.A4" office:value-type="string">
            <text:p text:style-name="P76">Software<text:span text:style-name="T37">s:</text:span></text:p>
          </table:table-cell>
          <table:table-cell table:style-name="Tabela17.B4" office:value-type="string">
            <text:p text:style-name="P86"/>
          </table:table-cell>
        </table:table-row>
        <table:table-row>
          <table:table-cell table:style-name="Tabela17.A8" office:value-type="string">
            <text:p text:style-name="P80">Protótipos:</text:p>
          </table:table-cell>
          <table:table-cell table:style-name="Tabela17.B5" office:value-type="string">
            <text:p text:style-name="P85"/>
          </table:table-cell>
        </table:table-row>
        <table:table-row>
          <table:table-cell table:style-name="Tabela17.A6" office:value-type="string">
            <text:p text:style-name="P80">Depósitos de patente:</text:p>
          </table:table-cell>
          <table:table-cell table:style-name="Tabela17.B6" office:value-type="string">
            <text:p text:style-name="P84"/>
          </table:table-cell>
        </table:table-row>
        <table:table-row>
          <table:table-cell table:style-name="Tabela17.A7" table:number-columns-spanned="2" office:value-type="string">
            <text:p text:style-name="P77">Outros (<text:span text:style-name="T38">identifique</text:span> e quantifique <text:span text:style-name="T38">nas linhas a seguir</text:span>):</text:p>
          </table:table-cell>
          <table:covered-table-cell/>
        </table:table-row>
        <table:table-row>
          <table:table-cell table:style-name="Tabela17.A8" office:value-type="string">
            <text:p text:style-name="P92"/>
          </table:table-cell>
          <table:table-cell table:style-name="Tabela17.B8" office:value-type="string">
            <text:p text:style-name="P85"/>
          </table:table-cell>
        </table:table-row>
        <table:table-row>
          <table:table-cell table:style-name="Tabela17.A9" office:value-type="string">
            <text:p text:style-name="P92"/>
          </table:table-cell>
          <table:table-cell table:style-name="Tabela17.B9" office:value-type="string">
            <text:p text:style-name="P85"/>
          </table:table-cell>
        </table:table-row>
      </table:table>
      <text:p text:style-name="P114"/>
      <text:p text:style-name="P10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Observações</text:p>
          </table:table-cell>
        </table:table-row>
        <table:table-row>
          <table:table-cell table:style-name="Tabela19.A2" office:value-type="string">
            <text:p text:style-name="P36"/>
          </table:table-cell>
        </table:table-row>
      </table:table>
      <text:p text:style-name="P105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Anexos</text:p>
            <text:p text:style-name="P65">(caso seja necessário, inserir mais linhas na tabela)</text:p>
          </table:table-cell>
        </table:table-row>
        <table:table-row>
          <table:table-cell table:style-name="Tabela16.A2" office:value-type="string">
            <text:p text:style-name="P37">Anexo I – <text:span text:style-name="T38">Prestação de contas financeira</text:span> (<text:span text:style-name="T42">OBRIGATÓRIO</text:span>)*</text:p>
          </table:table-cell>
        </table:table-row>
        <table:table-row>
          <table:table-cell table:style-name="Tabela16.A5" office:value-type="string">
            <text:p text:style-name="P37">Anexo II – Referências (OPCIONAL)</text:p>
          </table:table-cell>
        </table:table-row>
        <table:table-row>
          <table:table-cell table:style-name="Tabela16.A5" office:value-type="string">
            <text:p text:style-name="P38">Anexo I<text:span text:style-name="T39">I</text:span>I – Re<text:span text:style-name="T39">gistros fotográficos</text:span> (<text:span text:style-name="T42">OBRIGATÓRIO</text:span>)</text:p>
          </table:table-cell>
        </table:table-row>
        <table:table-row>
          <table:table-cell table:style-name="Tabela16.A5" office:value-type="string">
            <text:p text:style-name="P38">Anexo I<text:span text:style-name="T39">V</text:span> – <text:span text:style-name="T39">Listas de presença</text:span> <text:span text:style-name="T39">e outras formas de identificação do público participante </text:span>(<text:span text:style-name="T42">OBRIGATÓRIO</text:span>)</text:p>
          </table:table-cell>
        </table:table-row>
      </table:table>
      <text:p text:style-name="P109">* Seguir o modelo de Anexo I <text:span text:style-name="T59">do</text:span> Relatório de Ação de Extens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7"/>
      <text:p text:style-name="P12"/>
      <text:p text:style-name="P14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Mangal1" svg:font-family="Mangal"/>
    <style:font-face style:name="Times New Roman1" svg:font-family="'Times New Roman', 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draw="urn:oasis:names:tc:opendocument:xmlns:drawing:1.0" xmlns:form="urn:oasis:names:tc:opendocument:xmlns:form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19-08-09T09:38:45.525000000</meta:creation-date>
    <meta:editing-duration>PT5H47M51S</meta:editing-duration>
    <meta:editing-cycles>58</meta:editing-cycles>
    <dc:date>2020-04-23T00:32:42.331000000</dc:date>
    <meta:document-statistic meta:table-count="13" meta:image-count="1" meta:object-count="0" meta:page-count="3" meta:paragraph-count="120" meta:word-count="526" meta:character-count="3540" meta:non-whitespace-character-count="2869"/>
    <meta:generator>ODFPY/1.4.1</meta:generator>
  </office:meta>
</office:document-meta>
</file>