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Oficina de Tutoria em Física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Paulo Cezar Camargo Guede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08/08/2022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02/12/2022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>Oficina de Tutoria em Física</text:p>
          </table:table-cell>
          <table:table-cell table:style-name="Tabela5.B3" office:value-type="string">
            <text:p>Proporcionar aos alunos oriundos da rede pública municipal ou estadual, que estejam com dificuldade no aprendizado de Física, devido à pandemia ou a outros fatores educacionais, a oportunidade de participarem de oficinas de resolução de exercícios, acompanhados de tutores, que podem ser o professor de Física ou alunos das séries mais avançadas. Estas oficinas trabalharão os conteúdos estudados nas aulas regulares da turma ou, assuntos que são pré-requisitos para estes conteúdos.</text:p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>[Sugestão gerada por IA (Mistral) — revise e ajuste antes de enviar]
A oficina de tutoria em Física ofereceu suporte aos alunos com dificuldades no aprendizado da disciplina, por meio de atividades de resolução de exercícios e acompanhamento personalizado. A iniciativa buscou mitigar os impactos da pandemia e de outros fatores educacionais no desempenho dos estudantes.</text:p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