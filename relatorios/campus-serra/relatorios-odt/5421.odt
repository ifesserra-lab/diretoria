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arque Científico e Tecnológico do InovaSerra – PCTec Inova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Francisco José Casarim Rapchan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