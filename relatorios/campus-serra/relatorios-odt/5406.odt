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Jogos Estaduais do IFES 2025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Milainy Ludmila Santos Goulart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0/03/2025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18/07/2025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48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Jogos Estaduais do IFES 2025</text:p>
          </table:table-cell>
          <table:table-cell table:style-name="Tabela5.B3" office:value-type="string">
            <text:p>Realização de oficinas esportivas para estudantes com interesse em participarem das competições a serem realizadas nos Jogos Estaduais do IFES 2025. Surge como proposta de formação 
visando o fomento ao lazer, esporte e cultura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s oficinas esportivas proporcionaram formação técnica e tática aos estudantes, preparando-os para as competições dos Jogos Estaduais do IFES 2025. A ação fomentou a cultura esportiva e o lazer, além de estimular valores como trabalho em equipe, disciplina e superação, impactando positivamente a vivência estudantil no campu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