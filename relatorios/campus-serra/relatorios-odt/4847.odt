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rojeto Avançar – Nivelamento em Matem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ugusto Cesar Machado Ra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8/03/2024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9/11/2024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Projeto Avançar – Nivelamento em Matemática</text:p>
          </table:table-cell>
          <table:table-cell table:style-name="Tabela5.B3" office:value-type="string">
            <text:p>A ação objetiva alinhar e sistematizar uma proposta de intervenção pedagógica que visa minimizar às
lacunas no processo de aprendizagem trazidas pelos alunos ingressantes nos Cursos Técnicos
Integrados ao Ensino Médio do Ifes – Campus Serra. A designação AVANÇAR, foi pensada no sentido de
o aluno adquirir o conhecimento necessário para AVANÇAR e superar suas dificuldades. Nesse sentido,
o Projeto AVANÇAR no campus Serra, propõe um curso de nivelamento em Matemática, com carga
horária de 120 horas, distribuídas em 30 semanas, abordando conteúdos fundamentais para a inserção
desses alunos no ensino médio e para aplicação nas demais disciplinas nas áreas de exatas e aplicadas
de nossos cursos técnicos.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possibilitou a redução de lacunas de aprendizagem em Matemática entre os estudantes ingressantes nos Cursos Técnicos Integrados ao Ensino Médio, contribuindo para a melhoria do desempenho acadêmico e a permanência no curso. A sistematização da intervenção pedagógica favoreceu a construção de bases sólidas para o desenvolvimento de competências essenciais na disciplina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